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9d4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text:s/>ТЕХНИЧЕСКОЕ ЗАДАНИЕ <text:s/></text:p>
      <text:p text:style-name="Standard">на разработку веб-приложения «Аренда оборудования»</text:p>
      <text:p text:style-name="Standard"/>
      <text:p text:style-name="Standard">1. Цель работы</text:p>
      <text:p text:style-name="Standard">Разработать веб-приложение для учёта выдачи оборудования в аренду с поддержкой:</text:p>
      <text:p text:style-name="Standard">- регистрации клиентов,</text:p>
      <text:p text:style-name="Standard">- выбора доступного оборудования,</text:p>
      <text:p text:style-name="Standard">- расчёта стоимости аренды,</text:p>
      <text:p text:style-name="Standard">- формирования договора,</text:p>
      <text:p text:style-name="Standard">- логирования действий сотрудников,</text:p>
      <text:p text:style-name="Standard">- защиты данных,</text:p>
      <text:p text:style-name="Standard">- работы при отсутствии сети (офлайн-режим),</text:p>
      <text:p text:style-name="Standard">- контроля загрузки договора в БД перед печатью.</text:p>
      <text:p text:style-name="Standard"/>
      <text:p text:style-name="Standard">Максимальный балл за проект – <text:span text:style-name="T1">6</text:span> + дополнительные баллы (до 3).</text:p>
      <text:p text:style-name="Standard"/>
      <text:p text:style-name="Standard">2. Функциональные требования</text:p>
      <text:p text:style-name="Standard"/>
      <text:p text:style-name="Standard">2.1. Логирование и идентификация сотрудника </text:p>
      <text:p text:style-name="Standard">- При входе в систему (начале сессии) сотруднику присваивается уникальный номер сотрудника.</text:p>
      <text:p text:style-name="Standard">- Номер сохраняется в переменной сессии / локальном хранилище.</text:p>
      <text:p text:style-name="Standard">- Все действия сотрудника (оформление, возврат, поиск) должны логироваться с этим номером.</text:p>
      <text:p text:style-name="Standard"/>
      <text:p text:style-name="Standard">2.2. Работа с клиентами (по номеру паспорта)</text:p>
      <text:p text:style-name="Standard">- При оформлении аренды сотрудник вводит номер паспорта клиента.</text:p>
      <text:p text:style-name="Standard">- Система проверяет наличие клиента в БД:</text:p>
      <text:p text:style-name="Standard"><text:s text:c="2"/>- если существует → подтягиваются ФИО, телефон, адрес;</text:p>
      <text:p text:style-name="Standard"><text:s text:c="2"/>- если новый → открывается форма для ввода данных, которые сохраняются в БД.</text:p>
      <text:p text:style-name="Standard">- Защита данных клиента согласно п. 4.</text:p>
      <text:p text:style-name="Standard"/>
      <text:p text:style-name="Standard">2.3. Управление техникой (доступное оборудование)</text:p>
      <text:p text:style-name="Standard">- При выборе техники для заказа в выпадающем списке отображается только техника со статусом «в наличии».</text:p>
      <text:p text:style-name="Standard">- После оформления заказа → статус меняется на «сдана».</text:p>
      <text:p text:style-name="Standard">- После возврата → статус меняется на «в наличии».</text:p>
      <text:p text:style-name="Standard"/>
      <text:p text:style-name="Standard">2.4. Расчёт стоимости аренды</text:p>
      <text:p text:style-name="Standard">- Пользователь указывает срок аренды (сутки / часы).</text:p>
      <text:p text:style-name="Standard">- Автоматический расчёт: <text:s/></text:p>
      <text:p text:style-name="Standard"><text:s text:c="2"/>`стоимость = срок × цена_за_единицу_времени`</text:p>
      <text:p text:style-name="Standard">- Обновляется на UI без перезагрузки страницы.</text:p>
      <text:p text:style-name="Standard"/>
      <text:p text:style-name="Standard">2.5. Формирование и печать договора аренды с проверкой загрузки в БД</text:p>
      <text:p text:style-name="Standard">- После выбора клиента, техники и срока система генерирует договор (HTML+CSS для печати или PDF).</text:p>
      <text:p text:style-name="Standard">- Договор содержит:</text:p>
      <text:p text:style-name="Standard"><text:s text:c="2"/>- данные клиента</text:p>
      <text:p text:style-name="Standard"><text:s text:c="2"/>- данные оборудования</text:p>
      <text:p text:style-name="Standard"><text:soft-page-break/><text:s text:c="2"/>- срок и стоимость аренды</text:p>
      <text:p text:style-name="Standard"><text:s text:c="2"/>- номер заказа (UUID / автоинкремент)</text:p>
      <text:p text:style-name="Standard"><text:s text:c="2"/>- дату оформления</text:p>
      <text:p text:style-name="Standard"><text:s text:c="2"/>- QR-код или штрих-код с номером заказа (опционально)</text:p>
      <text:p text:style-name="Standard"/>
      <text:p text:style-name="Standard"><text:s/>Дополнительное требование (из вашего последнего комментария):</text:p>
      <text:p text:style-name="Standard">&gt; Печать договора разрешается ТОЛЬКО после того, как договор успешно загружен в базу данных сервера.</text:p>
      <text:p text:style-name="Standard">- Реализуется флаг `is_saved_to_db` у заказа.</text:p>
      <text:p text:style-name="Standard">- Если заказ ещё не сохранён на сервере (например, нет сети), то:</text:p>
      <text:p text:style-name="Standard"><text:s text:c="2"/>- Кнопка «Печать» заблокирована.</text:p>
      <text:p text:style-name="Standard"><text:s text:c="2"/>- Пользователю показывается сообщение: <text:s/></text:p>
      <text:p text:style-name="Standard"><text:s text:c="4"/>*«Договор ещё не загружен в базу. Подключитесь к сети и повторите попытку.»*</text:p>
      <text:p text:style-name="Standard">- Только после получения подтверждения от сервера печать становится доступной.</text:p>
      <text:p text:style-name="Standard"/>
      <text:p text:style-name="Standard">2.6. Сохранение заказа на сервере (+ офлайн-режим)</text:p>
      <text:p text:style-name="Standard">Каждый заказ сохраняется в БД сервера.</text:p>
      <text:p text:style-name="Standard"/>
      <text:p text:style-name="Standard">Хранимая информация:</text:p>
      <text:p text:style-name="Standard">- номер заказа</text:p>
      <text:p text:style-name="Standard">- номер сотрудника</text:p>
      <text:p text:style-name="Standard">- данные клиента (или ссылка)</text:p>
      <text:p text:style-name="Standard">- данные оборудования</text:p>
      <text:p text:style-name="Standard">- срок аренды</text:p>
      <text:p text:style-name="Standard">- стоимость</text:p>
      <text:p text:style-name="Standard">- дата / время создания</text:p>
      <text:p text:style-name="Standard">- статус заказа («активен» / «завершён» / «возвращён»)</text:p>
      <text:p text:style-name="Standard">- `synced` (true/false) – синхронизирован ли с сервером</text:p>
      <text:p text:style-name="Standard">- `is_saved_to_db` (true/false) – подтверждение сохранения на сервере</text:p>
      <text:p text:style-name="Standard"/>
      <text:p text:style-name="Standard"><text:s/>Офлайн-режим </text:p>
      <text:p text:style-name="Standard">- При отсутствии сети заказ сохраняется в локальном хранилище браузера (IndexedDB / LocalStorage).</text:p>
      <text:p text:style-name="Standard">- Пользователь может:</text:p>
      <text:p text:style-name="Standard"><text:s text:c="2"/>- оформить заказ</text:p>
      <text:p text:style-name="Standard"><text:s text:c="2"/>- распечатать договор только после того, как заказ будет загружен в БД (см. п. 2.5)</text:p>
      <text:p text:style-name="Standard">- При восстановлении сети:</text:p>
      <text:p text:style-name="Standard"><text:s text:c="2"/>- Система автоматически обнаруживает несинхронизированные заказы.</text:p>
      <text:p text:style-name="Standard"><text:s text:c="2"/>- Выполняет выгрузку на сервер.</text:p>
      <text:p text:style-name="Standard"><text:s text:c="2"/>- После успешного сохранения на сервере устанавливается `is_saved_to_db = true`.</text:p>
      <text:p text:style-name="Standard"><text:s text:c="2"/>- Если договор ещё не был распечатан ранее – разблокируется печать.</text:p>
      <text:p text:style-name="Standard"/>
      <text:p text:style-name="Standard">2.7. Поиск заказа по штрих-коду (номеру заказа) </text:p>
      <text:p text:style-name="Standard">- Реализовать страницу / поле поиска.</text:p>
      <text:p text:style-name="Standard">- Ввод номера заказа:</text:p>
      <text:p text:style-name="Standard"><text:s text:c="2"/>- с клавиатуры</text:p>
      <text:p text:style-name="Standard"><text:s text:c="2"/>- имитация сканера штрих-кода (быстрый ввод + событие Enter или скрытое поле)</text:p>
      <text:p text:style-name="Standard">- Система находит заказ в БД и отображает полную информацию.</text:p>
      <text:p text:style-name="Standard">- Офлайн-поиск также должен работать по локально сохранённым заказам.</text:p>
      <text:p text:style-name="Standard"/>
      <text:p text:style-name="Standard">---</text:p>
      <text:p text:style-name="Standard"/>
      <text:p text:style-name="Standard"><text:soft-page-break/><text:s/>3. Требования к безопасности и защите данных</text:p>
      <text:p text:style-name="Standard"/>
      <text:p text:style-name="Standard"><text:s/>3.1. Шифрование данных при передаче </text:p>
      <text:p text:style-name="Standard">- Дополнительное шифрование чувствительных данных (паспорт, телефон, адрес) перед отправкой на сервер (например, AES или RSA на фронте + расшифровка на бэке).</text:p>
      <text:p text:style-name="Standard">- Паспортные данные в БД хранятся только в зашифрованном виде.</text:p>
      <text:p text:style-name="Standard"/>
      <text:p text:style-name="Standard"><text:s/>3.2. Защита от подделки заказов</text:p>
      <text:p text:style-name="Standard">- Номер сотрудника нельзя подделать на клиенте.</text:p>
      <text:p text:style-name="Standard">- Каждое изменение статуса заказа должно логироваться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2T15:27:55.586498207</meta:creation-date>
    <dc:date>2026-05-12T16:39:26.948232087</dc:date>
    <meta:editing-duration>PT5M45S</meta:editing-duration>
    <meta:editing-cycles>1</meta:editing-cycles>
    <meta:document-statistic meta:table-count="0" meta:image-count="0" meta:object-count="0" meta:page-count="3" meta:paragraph-count="88" meta:word-count="595" meta:character-count="4136" meta:non-whitespace-character-count="3567"/>
    <meta:generator>LibreOffice/7.3.7.2$Linux_X86_64 LibreOffice_project/30$Build-2</meta:generator>
  </office:meta>
</office:document-meta>
</file>